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13000000B757F657882386973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5.903cm" fo:margin-left="0cm" fo:margin-top="0cm" fo:margin-bottom="0cm" table:align="left" style:writing-mode="page"/>
    </style:style>
    <style:style style:name="Tabla1.A" style:family="table-column">
      <style:table-column-properties style:column-width="5.741cm"/>
    </style:style>
    <style:style style:name="Tabla1.B" style:family="table-column">
      <style:table-column-properties style:column-width="10.162cm"/>
    </style:style>
    <style:style style:name="Tabla1.1" style:family="table-row">
      <style:table-row-properties fo:keep-together="auto"/>
    </style:style>
    <style:style style:name="Tabla1.A1" style:family="table-cell">
      <style:table-cell-properties fo:padding-left="0.191cm" fo:padding-right="0.191cm" fo:padding-top="0cm" fo:padding-bottom="0cm" fo:border="none"/>
    </style:style>
    <style:style style:name="P1" style:family="paragraph" style:parent-style-name="Heading_20_2">
      <style:paragraph-properties fo:line-height="115%"/>
    </style:style>
    <style:style style:name="P2" style:family="paragraph" style:parent-style-name="Text_20_body">
      <style:paragraph-properties fo:line-height="115%"/>
    </style:style>
    <style:style style:name="P3" style:family="paragraph" style:parent-style-name="Heading_20_1">
      <style:paragraph-properties fo:line-height="115%"/>
    </style:style>
    <style:style style:name="P4" style:family="paragraph" style:parent-style-name="Contents_20_1">
      <style:paragraph-properties fo:line-height="200%">
        <style:tab-stops>
          <style:tab-stop style:position="17cm" style:type="right" style:leader-style="dotted" style:leader-text="."/>
        </style:tab-stops>
      </style:paragraph-properties>
    </style:style>
    <style:style style:name="P5" style:family="paragraph" style:parent-style-name="Contents_20_2">
      <style:paragraph-properties fo:line-height="200%">
        <style:tab-stops>
          <style:tab-stop style:position="16.501cm" style:type="right" style:leader-style="dotted" style:leader-text="."/>
        </style:tab-stops>
      </style:paragraph-properties>
    </style:style>
    <style:style style:name="P6" style:family="paragraph" style:parent-style-name="Heading_20_2">
      <style:paragraph-properties fo:line-height="200%"/>
      <style:text-properties officeooo:paragraph-rsid="000b8214"/>
    </style:style>
    <style:style style:name="P7" style:family="paragraph" style:parent-style-name="Text_20_body">
      <style:paragraph-properties fo:line-height="200%"/>
      <style:text-properties officeooo:paragraph-rsid="000b8214"/>
    </style:style>
    <style:style style:name="P8" style:family="paragraph" style:parent-style-name="Heading_20_2">
      <style:paragraph-properties fo:line-height="150%"/>
      <style:text-properties officeooo:paragraph-rsid="000b8214"/>
    </style:style>
    <style:style style:name="P9" style:family="paragraph" style:parent-style-name="Text_20_body">
      <style:paragraph-properties fo:line-height="150%"/>
      <style:text-properties officeooo:paragraph-rsid="000b8214"/>
    </style:style>
    <style:style style:name="P10" style:family="paragraph" style:parent-style-name="Heading_20_2">
      <style:text-properties officeooo:paragraph-rsid="00122688"/>
    </style:style>
    <style:style style:name="P11" style:family="paragraph" style:parent-style-name="Standard">
      <style:text-properties officeooo:paragraph-rsid="00122688"/>
    </style:style>
    <style:style style:name="P12" style:family="paragraph" style:parent-style-name="Text_20_body">
      <style:text-properties officeooo:paragraph-rsid="00122688"/>
    </style:style>
    <style:style style:name="P13" style:family="paragraph" style:parent-style-name="Standard">
      <style:text-properties officeooo:paragraph-rsid="00122688" style:font-name-complex="Calibri"/>
    </style:style>
    <style:style style:name="P14" style:family="paragraph" style:parent-style-name="Standard">
      <style:paragraph-properties fo:margin-top="0cm" fo:margin-bottom="0cm" style:contextual-spacing="false" fo:line-height="200%" fo:text-align="center" style:justify-single-word="false" fo:padding-left="0cm" fo:padding-right="0cm" fo:padding-top="0.282cm" fo:padding-bottom="0.282cm" fo:border-left="none" fo:border-right="none" fo:border-top="3pt solid #156082" fo:border-bottom="3pt solid #156082"/>
      <style:text-properties fo:color="#000000" loext:opacity="100%" fo:font-size="12pt" fo:font-style="italic" officeooo:paragraph-rsid="00122688" style:font-size-asian="12pt" style:font-style-asian="italic" style:font-size-complex="12pt" style:font-style-complex="italic">
        <loext:char-complex-color loext:theme-type="dark1" loext:color-type="theme"/>
      </style:text-properties>
    </style:style>
    <style:style style:name="P15" style:family="paragraph" style:parent-style-name="Standard">
      <style:paragraph-properties fo:margin-top="0cm" fo:margin-bottom="0cm" style:contextual-spacing="false" fo:line-height="200%" fo:padding-left="0cm" fo:padding-right="0cm" fo:padding-top="0.282cm" fo:padding-bottom="0cm" fo:border-left="none" fo:border-right="none" fo:border-top="3pt solid #156082" fo:border-bottom="3pt solid #156082"/>
      <style:text-properties fo:color="#000000" loext:opacity="100%" fo:font-size="12pt" fo:font-style="italic" officeooo:paragraph-rsid="00122688" style:font-size-asian="12pt" style:font-style-asian="italic" style:font-style-complex="italic">
        <loext:char-complex-color loext:theme-type="dark1" loext:color-type="theme"/>
      </style:text-properties>
    </style:style>
    <style:style style:name="P16" style:family="paragraph" style:parent-style-name="Standard" style:master-page-name="Standard">
      <style:paragraph-properties style:page-number="1"/>
      <style:text-properties officeooo:paragraph-rsid="00122688" style:font-name-complex="Calibri"/>
    </style:style>
    <style:style style:name="P17" style:family="paragraph" style:parent-style-name="Standard">
      <style:paragraph-properties fo:margin-top="0cm" fo:margin-bottom="0cm" style:contextual-spacing="false" fo:line-height="200%" fo:text-align="start" style:justify-single-word="false" fo:orphans="2" fo:widows="2"/>
      <style:text-properties officeooo:paragraph-rsid="00122688"/>
    </style:style>
    <style:style style:name="P18" style:family="paragraph" style:parent-style-name="Standard">
      <style:paragraph-properties fo:margin-top="0cm" fo:margin-bottom="0cm" style:contextual-spacing="false" fo:line-height="200%" fo:text-align="start" style:justify-single-word="false" fo:orphans="2" fo:widows="2"/>
      <style:text-properties officeooo:rsid="00110bc8" officeooo:paragraph-rsid="00122688"/>
    </style:style>
    <style:style style:name="P19" style:family="paragraph" style:parent-style-name="Standard">
      <style:text-properties fo:color="#156082" loext:opacity="100%" officeooo:paragraph-rsid="00122688" style:font-name-complex="Calibri">
        <loext:char-complex-color loext:theme-type="accent1" loext:color-type="theme"/>
      </style:text-properties>
    </style:style>
    <style:style style:name="P20" style:family="paragraph" style:parent-style-name="Heading_20_2" style:master-page-name="First_20_Page">
      <style:paragraph-properties style:page-number="auto"/>
      <style:text-properties officeooo:paragraph-rsid="00122688"/>
    </style:style>
    <style:style style:name="P21" style:family="paragraph" style:parent-style-name="Frame_20_contents">
      <style:paragraph-properties fo:margin-top="0cm" fo:margin-bottom="0.353cm" style:contextual-spacing="false"/>
    </style:style>
    <style:style style:name="P22" style:family="paragraph">
      <loext:graphic-properties draw:fill="solid" draw:fill-color="#c0504d"/>
      <style:paragraph-properties fo:text-align="start"/>
      <style:text-properties fo:font-size="11pt"/>
    </style:style>
    <style:style style:name="P23" style:family="paragraph">
      <loext:graphic-properties draw:fill="solid" draw:fill-color="#4f81bd"/>
      <style:paragraph-properties fo:text-align="start"/>
      <style:text-properties fo:font-size="11pt"/>
    </style:style>
    <style:style style:name="P24" style:family="paragraph">
      <loext:graphic-properties draw:fill="solid" draw:fill-color="#ffffff"/>
      <style:paragraph-properties fo:text-align="start"/>
      <style:text-properties fo:color="#000000" loext:opacity="100%" fo:font-size="18pt"/>
    </style:style>
    <style:style style:name="T1" style:family="text">
      <style:text-properties fo:font-weight="bold" style:font-weight-asian="bold" style:font-weight-complex="bold"/>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officeooo:rsid="00102059"/>
    </style:style>
    <style:style style:name="T5" style:family="text">
      <style:text-properties fo:color="#156082" loext:opacity="100%" fo:font-size="18pt" fo:font-weight="bold" style:font-size-asian="18pt" style:font-weight-asian="bold" style:font-size-complex="18pt" style:font-weight-complex="bold">
        <loext:char-complex-color loext:theme-type="accent1" loext:color-type="theme"/>
      </style:text-properties>
    </style:style>
    <style:style style:name="T6" style:family="text">
      <style:text-properties fo:color="#156082" loext:opacity="100%" fo:font-size="16pt" fo:language="en" fo:country="IE" fo:font-style="italic" style:letter-kerning="true" style:font-name-asian="Aptos" style:font-size-asian="16pt" style:language-asian="en" style:country-asian="US" style:font-style-asian="italic" style:font-size-complex="16pt" style:language-complex="ar" style:country-complex="SA" style:font-style-complex="italic">
        <loext:char-complex-color loext:theme-type="accent1" loext:color-type="theme"/>
      </style:text-properties>
    </style:style>
    <style:style style:name="T7" style:family="text">
      <style:text-properties fo:color="#156082" loext:opacity="100%" fo:font-size="16pt" fo:font-weight="bold" style:font-size-asian="16pt" style:font-weight-asian="bold" style:font-name-complex="Calibri" style:font-size-complex="16pt" style:font-weight-complex="bold">
        <loext:char-complex-color loext:theme-type="accent1" loext:color-type="theme"/>
      </style:text-properties>
    </style:style>
    <style:style style:name="T8" style:family="text">
      <style:text-properties fo:color="#156082" loext:opacity="100%" fo:font-size="16pt" fo:font-style="italic" style:font-size-asian="16pt" style:font-style-asian="italic" style:font-size-complex="16pt" style:font-style-complex="italic">
        <loext:char-complex-color loext:theme-type="accent1" loext:color-type="theme"/>
      </style:text-properties>
    </style:style>
    <style:style style:name="T9" style:family="text">
      <style:text-properties fo:color="#156082" loext:opacity="100%" style:font-name-complex="Calibri">
        <loext:char-complex-color loext:theme-type="accent1" loext:color-type="theme"/>
      </style:text-properties>
    </style:style>
    <style:style style:name="T10" style:family="text">
      <style:text-properties fo:color="#000000" loext:opacity="100%" fo:font-size="16pt" fo:language="en" fo:country="IE" style:letter-kerning="true" style:font-name-asian="Aptos" style:font-size-asian="16pt" style:language-asian="en" style:country-asian="US" style:font-size-complex="16pt" style:language-complex="ar" style:country-complex="SA">
        <loext:char-complex-color loext:theme-type="dark1" loext:color-type="theme"/>
      </style:text-properties>
    </style:style>
    <style:style style:name="T11" style:family="text">
      <style:text-properties fo:color="#000000" loext:opacity="100%" fo:font-size="16pt" fo:language="en" fo:country="IE" officeooo:rsid="00110bc8" style:letter-kerning="true" style:font-name-asian="Aptos" style:font-size-asian="16pt" style:language-asian="en" style:country-asian="US" style:font-size-complex="16pt" style:language-complex="ar" style:country-complex="SA">
        <loext:char-complex-color loext:theme-type="dark1" loext:color-type="theme"/>
      </style:text-properties>
    </style:style>
    <style:style style:name="T12" style:family="text">
      <style:text-properties fo:color="#000000" loext:opacity="100%" fo:font-size="16pt" style:font-size-asian="16pt" style:font-size-complex="16pt">
        <loext:char-complex-color loext:theme-type="dark1" loext:color-type="theme"/>
      </style:text-properties>
    </style:style>
    <style:style style:name="T13" style:family="text">
      <style:text-properties fo:color="#000000" loext:opacity="100%" fo:font-size="14pt" style:font-size-asian="14pt" style:font-name-complex="Calibri" style:font-size-complex="14pt"/>
    </style:style>
    <style:style style:name="T14" style:family="text">
      <style:text-properties fo:font-size="14pt" style:font-size-asian="14pt" style:font-name-complex="Calibri" style:font-size-complex="14pt"/>
    </style:style>
    <style:style style:name="T15" style:family="text">
      <style:text-properties fo:font-size="14pt" style:font-size-asian="14pt" style:font-size-complex="14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cm" fo:margin-right="0cm" fo:margin-top="0cm" fo:margin-bottom="0cm" style:run-through="foreground" style:wrap="run-through" style:number-wrapped-paragraphs="no-limit" style:vertical-pos="from-top" style:vertical-rel="page-content" style:horizontal-pos="from-left" style:horizontal-rel="page" draw:wrap-influence-on-position="once-concurrent" loext:allow-overlap="true" style:flow-with-text="false"/>
    </style:style>
    <style:style style:name="gr2" style:family="graphic">
      <style:graphic-properties draw:stroke="none" svg:stroke-width="0.071cm" svg:stroke-linecap="butt" draw:fill="solid" draw:fill-color="#c0504d" draw:textarea-vertical-align="top" draw:auto-grow-height="false" fo:min-height="24.396cm" fo:min-width="0.637cm" fo:padding-top="0cm" fo:padding-bottom="0cm" fo:padding-left="0cm" fo:padding-right="0cm" fo:wrap-option="wrap" loext:decorative="false" style:run-through="foreground">
        <loext:fill-complex-color loext:theme-type="accent2" loext:color-type="theme"/>
      </style:graphic-properties>
    </style:style>
    <style:style style:name="gr3" style:family="graphic">
      <style:graphic-properties draw:stroke="none" svg:stroke-width="0.071cm" svg:stroke-linecap="butt" draw:fill="solid" draw:fill-color="#4f81bd" draw:textarea-vertical-align="top" draw:auto-grow-height="false" fo:min-height="0.63cm" fo:min-width="0.637cm" fo:padding-top="0cm" fo:padding-bottom="0cm" fo:padding-left="0cm" fo:padding-right="0cm" fo:wrap-option="wrap" loext:decorative="false" style:run-through="foreground">
        <loext:fill-complex-color loext:theme-type="accent1" loext:color-type="theme"/>
      </style:graphic-properties>
    </style:style>
    <style:style style:name="gr4" style:family="graphic" style:parent-style-name="Frame">
      <style:graphic-properties draw:stroke="solid" svg:stroke-width="0.079cm" svg:stroke-color="#156082" draw:stroke-linejoin="round" draw:fill="solid" draw:fill-color="#ffffff" draw:textarea-vertical-align="top" draw:auto-grow-height="false" fo:min-height="7.659cm" fo:min-width="15.528cm" fo:padding-top="0.127cm" fo:padding-bottom="0.127cm" fo:padding-left="0.254cm" fo:padding-right="0.254cm" fo:wrap-option="wrap" loext:decorative="false" fo:margin-left="0.041cm" fo:margin-right="0.041cm" fo:margin-top="0.042cm" fo:margin-bottom="0.039cm" style:run-through="foreground" style:wrap="run-through" style:number-wrapped-paragraphs="no-limit" style:vertical-pos="from-top" style:vertical-rel="paragraph" style:horizontal-pos="left" style:horizontal-rel="page-content"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2"><text:bookmark-start text:name="__RefHeading___Toc64_2954148867"/><text:bookmark-end text:name="__RefHeading___Toc64_2954148867"/></text:h>
      <text:p text:style-name="P16"><draw:frame draw:style-name="fr1" draw:name="Picture 1" text:anchor-type="char" svg:x="11.596cm" svg:y="-0.767cm" svg:width="6.13cm" svg:height="2.117cm" draw:z-index="2"><draw:image xlink:href="Pictures/1000000000000213000000B757F6578823869731.png" xlink:type="simple" xlink:show="embed" xlink:actuate="onLoad" draw:mime-type="image/png"/><svg:desc>A logo for college computing

Description automatically generated</svg:desc></draw:frame><draw:g text:anchor-type="char" draw:z-index="2" draw:name="Group 24" draw:style-name="gr1"><draw:custom-shape draw:name="Rectangle 3" draw:style-name="gr2" draw:text-style-name="P22" svg:width="0.636cm" svg:height="24.395cm" svg:x="1.217cm" svg:y="-3.35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 draw:style-name="gr3" draw:text-style-name="P23" svg:width="0.636cm" svg:height="0.629cm" svg:x="1.217cm" svg:y="21.4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1"><text:span text:style-name="T5"/></text:p>
      <text:p text:style-name="P14"/>
      <table:table table:name="Tabla1" table:style-name="Tabla1">
        <table:table-column table:style-name="Tabla1.A"/>
        <table:table-column table:style-name="Tabla1.B"/>
        <table:table-row table:style-name="Tabla1.1">
          <table:table-cell table:style-name="Tabla1.A1" office:value-type="string">
            <text:p text:style-name="P17" loext:marker-style-name="T8"><text:span text:style-name="T6">Student Full Name</text:span></text:p>
          </table:table-cell>
          <table:table-cell table:style-name="Tabla1.A1" office:value-type="string">
            <text:p text:style-name="P17" loext:marker-style-name="T12"><text:span text:style-name="T10">Adriana Soledad Yash</text:span></text:p>
          </table:table-cell>
        </table:table-row>
        <table:table-row table:style-name="Tabla1.1">
          <table:table-cell table:style-name="Tabla1.A1" office:value-type="string">
            <text:p text:style-name="P17" loext:marker-style-name="T8"><text:span text:style-name="T6">Student Number</text:span></text:p>
          </table:table-cell>
          <table:table-cell table:style-name="Tabla1.A1" office:value-type="string">
            <text:p text:style-name="P17" loext:marker-style-name="T12"><text:span text:style-name="T10">2025141</text:span></text:p>
          </table:table-cell>
        </table:table-row>
        <table:table-row table:style-name="Tabla1.1">
          <table:table-cell table:style-name="Tabla1.A1" office:value-type="string">
            <text:p text:style-name="P17" loext:marker-style-name="T8"><text:span text:style-name="T6">Module Title</text:span></text:p>
          </table:table-cell>
          <table:table-cell table:style-name="Tabla1.A1" office:value-type="string">
            <text:p text:style-name="P18" loext:marker-style-name="T12"><text:span text:style-name="T10">Machine Learning &amp; Data Visualisation</text:span></text:p>
          </table:table-cell>
        </table:table-row>
        <table:table-row table:style-name="Tabla1.1">
          <table:table-cell table:style-name="Tabla1.A1" office:value-type="string">
            <text:p text:style-name="P17" loext:marker-style-name="T8"><text:span text:style-name="T6">Assessment Title</text:span></text:p>
          </table:table-cell>
          <table:table-cell table:style-name="Tabla1.A1" office:value-type="string">
            <text:p text:style-name="P18" loext:marker-style-name="T12"><text:span text:style-name="T10">Integrated </text:span></text:p>
          </table:table-cell>
        </table:table-row>
        <table:table-row table:style-name="Tabla1.1">
          <table:table-cell table:style-name="Tabla1.A1" office:value-type="string">
            <text:p text:style-name="P17" loext:marker-style-name="T8"><text:span text:style-name="T6">Lector’s name</text:span></text:p>
          </table:table-cell>
          <table:table-cell table:style-name="Tabla1.A1" office:value-type="string">
            <text:p text:style-name="P17" loext:marker-style-name="T12"><text:span text:style-name="T11">Dr. Muhammad Iqbal, David McQ</text:span><text:span text:style-name="T10">uaid </text:span></text:p>
          </table:table-cell>
        </table:table-row>
        <table:table-row table:style-name="Tabla1.1">
          <table:table-cell table:style-name="Tabla1.A1" office:value-type="string">
            <text:p text:style-name="P17" loext:marker-style-name="T8"><text:span text:style-name="T6">Date of Submission</text:span></text:p>
          </table:table-cell>
          <table:table-cell table:style-name="Tabla1.A1" office:value-type="string">
            <text:p text:style-name="P17" loext:marker-style-name="T12"><text:span text:style-name="T11">12 Dece</text:span><text:span text:style-name="T10">mber 2025</text:span></text:p>
          </table:table-cell>
        </table:table-row>
      </table:table>
      <text:p text:style-name="P15"><draw:custom-shape text:anchor-type="char" draw:z-index="0" draw:name="Text Box 1" draw:style-name="gr4" draw:text-style-name="P24" svg:width="16.035cm" svg:height="7.912cm" svg:x="0.041cm" svg:y="2.355cm"><text:p text:style-name="Frame_20_contents" loext:marker-style-name="T7"><text:span text:style-name="T7">Declaration</text:span></text:p><text:p text:style-name="Frame_20_contents" loext:marker-style-name="T14"><text:span text:style-name="T13">By submitting this assessment, I confirm that I have read the CCT policy on academic misconduct and understand the implications of submitting work that is not my own or does not appropriately reference material taken from a third party or other source. </text:span></text:p><text:p text:style-name="Frame_20_contents" loext:marker-style-name="T14"><text:span text:style-name="T13">I declare it to be my own work and that all material from third parties has been appropriately referenced.</text:span></text:p><text:p text:style-name="P21" loext:marker-style-name="T15"><text:span text:style-name="T13"><text:s/>I further confirm that this work has not previously been submitted for assessment by myself or someone else in CCT College Dublin or any other higher education institu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 loext:marker-style-name="T9"><text:span text:style-name="Subtle_20_Reference"><text:span text:style-name="T9"/></text:span></text:p>
      <text:p text:style-name="P13"/>
      <text:h text:style-name="P10" text:outline-level="2"/>
      <text:h text:style-name="P10" text:outline-level="2"/>
      <text:h text:style-name="P10" text:outline-level="2"/>
      <text:p text:style-name="P12"/>
      <text:p text:style-name="P12"/>
      <text:p text:style-name="P12"/>
      <text:p text:style-name="P12"/>
      <text:p text:style-name="P12"/>
      <text:p text:style-name="P12"/>
      <text:p text:style-name="P12"/>
      <text:p text:style-name="P12"/>
      <text:p text:style-name="P12"/>
      <text:h text:style-name="P6" text:outline-level="2"><text:bookmark-start text:name="__RefHeading___Toc68_2954148867"/>INDEX<text:bookmark-end text:name="__RefHeading___Toc68_2954148867"/></text:h>
      <text:table-of-content text:style-name="Sect1" text:name="Sumario1">
        <text:table-of-content-source text:outline-level="2">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soft-page-break/></text:p>
          <text:p text:style-name="P5"><text:a xlink:type="simple" xlink:href="#__RefHeading___Toc68_2954148867" text:style-name="Index_20_Link" text:visited-style-name="Index_20_Link"/></text:p>
          <text:p text:style-name="P5"><text:a xlink:type="simple" xlink:href="#__RefHeading___Toc644_116036760" text:style-name="Index_20_Link" text:visited-style-name="Index_20_Link">1. Introduction<text:tab/>2</text:a></text:p>
          <text:p text:style-name="P5"><text:a xlink:type="simple" xlink:href="#__RefHeading___Toc24_2954148867" text:style-name="Index_20_Link" text:visited-style-name="Index_20_Link">2. Recommendation Systems in Online Retail<text:tab/>3</text:a></text:p>
          <text:p text:style-name="P5"><text:a xlink:type="simple" xlink:href="#__RefHeading___Toc38_2954148867" text:style-name="Index_20_Link" text:visited-style-name="Index_20_Link">3. Market Basket Analysis<text:tab/>3</text:a></text:p>
          <text:p text:style-name="P4"><text:a xlink:type="simple" xlink:href="#__RefHeading___Toc646_116036760" text:style-name="Index_20_Link" text:visited-style-name="Index_20_Link">3.1 Rationale for Association Rule Learning in Retail<text:tab/>3</text:a></text:p>
          <text:p text:style-name="P4"><text:a xlink:type="simple" xlink:href="#__RefHeading___Toc648_116036760" text:style-name="Index_20_Link" text:visited-style-name="Index_20_Link">3.2 Implementation of the Apriori Algorithm<text:tab/>4</text:a></text:p>
          <text:p text:style-name="P4"><text:a xlink:type="simple" xlink:href="#__RefHeading___Toc650_116036760" text:style-name="Index_20_Link" text:visited-style-name="Index_20_Link">3.3 Implementation of the FP Growth Algorithm<text:tab/>4</text:a></text:p>
          <text:p text:style-name="P4"><text:a xlink:type="simple" xlink:href="#__RefHeading___Toc652_116036760" text:style-name="Index_20_Link" text:visited-style-name="Index_20_Link">3.4 Comparative Interpretation<text:tab/>4</text:a></text:p>
          <text:p text:style-name="P5"><text:a xlink:type="simple" xlink:href="#__RefHeading___Toc654_116036760" text:style-name="Index_20_Link" text:visited-style-name="Index_20_Link">4. Dashboard and Strategic Insights<text:tab/>5</text:a></text:p>
          <text:p text:style-name="P5"><text:a xlink:type="simple" xlink:href="#__RefHeading___Toc656_116036760" text:style-name="Index_20_Link" text:visited-style-name="Index_20_Link">4.3 Revenue concentration across product<text:tab/>6</text:a></text:p>
          <text:p text:style-name="P5"><text:a xlink:type="simple" xlink:href="#__RefHeading___Toc48_2954148867" text:style-name="Index_20_Link" text:visited-style-name="Index_20_Link">5. Data Preparation Rationale<text:tab/>6</text:a></text:p>
          <text:p text:style-name="P5"><text:a xlink:type="simple" xlink:href="#__RefHeading___Toc50_2954148867" text:style-name="Index_20_Link" text:visited-style-name="Index_20_Link">5.1 Data Cleaning<text:tab/>6</text:a></text:p>
          <text:p text:style-name="P5"><text:a xlink:type="simple" xlink:href="#__RefHeading___Toc52_2954148867" text:style-name="Index_20_Link" text:visited-style-name="Index_20_Link">5.2 Data Transformation &amp; Feature Engineering<text:tab/>6</text:a></text:p>
          <text:p text:style-name="P5"><text:a xlink:type="simple" xlink:href="#__RefHeading___Toc54_2954148867" text:style-name="Index_20_Link" text:visited-style-name="Index_20_Link">5.3 Dataset Restructuring for Different Models<text:tab/>7</text:a></text:p>
          <text:p text:style-name="P5"><text:a xlink:type="simple" xlink:href="#__RefHeading___Toc56_2954148867" text:style-name="Index_20_Link" text:visited-style-name="Index_20_Link">5.4 Discussion of Decisions and Limitations<text:tab/>7</text:a></text:p>
          <text:p text:style-name="P5"><text:a xlink:type="simple" xlink:href="#__RefHeading___Toc658_116036760" text:style-name="Index_20_Link" text:visited-style-name="Index_20_Link">6. Conclusion<text:tab/>8</text:a></text:p>
          <text:p text:style-name="P5"><text:a xlink:type="simple" xlink:href="#__RefHeading___Toc660_116036760" text:style-name="Index_20_Link" text:visited-style-name="Index_20_Link">7. References<text:tab/>8</text:a></text:p>
          <text:p text:style-name="P5"><text:a xlink:type="simple" xlink:href="#__RefHeading___Toc662_116036760" text:style-name="Index_20_Link" text:visited-style-name="Index_20_Link">8. Appendix<text:tab/>9</text:a></text:p>
        </text:index-body>
      </text:table-of-content>
      <text:h text:style-name="P6" text:outline-level="2"><text:span text:style-name="Strong_20_Emphasis"/></text:h>
      <text:p text:style-name="P7"><text:span text:style-name="Strong_20_Emphasis"/></text:p>
      <text:p text:style-name="P9"><text:bookmark-start text:name="__RefHeading___Toc70_2954148867"/><text:bookmark-end text:name="__RefHeading___Toc70_2954148867"/><text:span text:style-name="Strong_20_Emphasis"/></text:p>
      <text:h text:style-name="P8" text:outline-level="2"><text:bookmark-start text:name="__RefHeading___Toc644_116036760"/><text:soft-page-break/><text:span text:style-name="Strong_20_Emphasis">1. Introduction</text:span><text:bookmark-end text:name="__RefHeading___Toc644_116036760"/></text:h>
      <text:p text:style-name="P2">Online retail operates on large volumes of transactions, and understanding these patterns is essential for improving the way customers navigate product catalogues. Machine learning offers tools that organise this information and reveal consistent behavioural structures. Research in the field shows that recommendation systems are central to this process. Bobadilla et al. (2013) describe how these systems reduce the effort required from users, improve product discovery, and support decision-making across digital platforms. These functions align with the needs of online retailers, where the range of products is broad and customer attention is limited.</text:p>
      <text:p text:style-name="P2">This report uses the “<text:span text:style-name="Emphasis">Online Retail II”</text:span> dataset from Kaggle, which contains real transactions from a UK-based retailer. The dataset includes product codes, quantities, timestamps, customer identifiers, and item descriptions. Its format supports both recommendation modelling and Market Basket Analysis, and it complies with the requirement to use a dataset external to class tutorials.</text:p>
      <text:p text:style-name="P2">The work is divided into four parts. The first compares content-based and collaborative filtering methods, including the implementation of <text:span text:style-name="T1">user-user and item-item models</text:span>. The second applies <text:span text:style-name="T1">Apriori and FP-Growth</text:span> for Market Basket Analysis. The third develops an interactive dashboard for adults aged 65 and above. The final section explains the data preparation steps required for the modelling and visualisation process.</text:p>
      <text:p text:style-name="P2"/>
      <text:h text:style-name="P1" text:outline-level="2"><text:bookmark-start text:name="__RefHeading___Toc24_2954148867"/><text:span text:style-name="Strong_20_Emphasis">2. Recommendation Systems in Online Retail</text:span><text:bookmark-end text:name="__RefHeading___Toc24_2954148867"/></text:h>
      <text:p text:style-name="Text_20_body"/>
      <text:p text:style-name="Text_20_body">Two machine learning approaches were applied. Content based filtering focuses on item attributes, comparing products through their descriptions and recommending similar items. Collaborative filtering focuses on behaviour, identifying similarities between users or items based on shared purchase histories. Each approach has limitations, as content based filtering can produce narrow results, while collaborative filtering requires sufficient interaction data. Using both approaches together helps mitigate these issues and results in more balanced recommendations.</text:p>
      <text:p text:style-name="Text_20_body">The dataset supports this modelling process by explicitly linking users, items, and transactions. Customer identifiers enable behavioural tracking, product descriptions allow feature construction, and invoice level records connect purchases across time. Prior to modelling, cancelled transactions were removed, descriptions were standardised, and sparse interactions were filtered out. Transforming purchases into binary interactions proved essential, as it reduced sparsity and improved the stability of collaborative filtering models.</text:p>
      <text:p text:style-name="Text_20_body">Content based filtering was implemented using TF IDF and cosine similarity to ensure consistent item level recommendations. Collaborative filtering models applied cosine similarity at both user and item levels, with item item filtering performing more reliably due to repeated product interactions across customers. Together, these results demonstrate that the dataset provides a suitable foundation for recommendation systems in an online retail context.</text:p>
      <text:p text:style-name="P2"><text:soft-page-break/><text:span text:style-name="Strong_20_Emphasis"/></text:p>
      <text:p text:style-name="P2"><text:s/></text:p>
      <text:h text:style-name="P1" text:outline-level="2"><text:bookmark-start text:name="__RefHeading___Toc38_2954148867"/><text:span text:style-name="Strong_20_Emphasis"><text:span text:style-name="T2">3. Market Basket Analysis</text:span></text:span><text:bookmark-end text:name="__RefHeading___Toc38_2954148867"/></text:h>
      <text:h text:style-name="P3" text:outline-level="1"><text:bookmark-start text:name="__RefHeading___Toc646_116036760"/><text:span text:style-name="Strong_20_Emphasis"><text:span text:style-name="T3">3.1 Rationale for Association Rule Learning in Retail</text:span></text:span><text:bookmark-end text:name="__RefHeading___Toc646_116036760"/></text:h>
      <text:p text:style-name="Text_20_body">Association rule learning helps reveal how products behave inside real baskets, not just as individual items. Retail purchases often happen in small combinations that customers repeat across time, and these patterns are hard to detect by looking at frequencies alone. Apriori and FP Growth help organise this information by scanning transactions and showing which items tend to appear together. This is useful for decisions about shelf placement, cross selling and stock planning, because it shows which products have a natural pull toward each other. In the context of the assignment, the method confirms whether the dataset has enough internal structure to support machine learning models that rely on repeated behaviour.</text:p>
      <text:h text:style-name="Heading_20_1" text:outline-level="1"><text:bookmark-start text:name="__RefHeading___Toc648_116036760"/><text:span text:style-name="Strong_20_Emphasis"><text:span text:style-name="T3">3.2 Implementation of the Apriori Algorithm</text:span></text:span><text:bookmark-end text:name="__RefHeading___Toc648_116036760"/></text:h>
      <text:p text:style-name="Text_20_body">A minimum support threshold was applied to remove item combinations that appear only a few times. This keeps the model focused on patterns that matter and prevents the rule set from becoming noisy. Confidence was used to measure how often the consequent appears when the antecedent is present, and lift helped check whether the relationship is stronger than chance. These three parameters guide the selection of rules that reflect genuine buying habits rather than accidents in the data.</text:p>
      <text:p text:style-name="Text_20_body">The Apriori algorithm returned item combinations that appeared across several customer baskets. Many of these involved home decor items or small seasonal goods that customers tend to purchase in sets. The rules with the highest lift values showed clear, repeated relationships between items, which is exactly what the method aims to uncover. These patterns form the first layer of insight for understanding which items can support cross selling or bundled offers.</text:p>
      <text:h text:style-name="Heading_20_1" text:outline-level="1"><text:bookmark-start text:name="__RefHeading___Toc650_116036760"/><text:span text:style-name="Strong_20_Emphasis"><text:span text:style-name="T3">3.3 Implementation of the FP Growth Algorithm</text:span></text:span><text:bookmark-end text:name="__RefHeading___Toc650_116036760"/></text:h>
      <text:p text:style-name="Text_20_body">FP Growth takes a different route to reach the same goal. Instead of scanning the entire dataset multiple times, it builds a compressed tree structure that stores frequent items in an ordered way. This structure lets the algorithm find frequent itemsets without generating candidate lists step by step, which is where Apriori tends to slow down. The approach is particularly efficient when certain items appear often, because the tree captures this repetition directly.</text:p>
      <text:p text:style-name="Text_20_body">The rules produced by FP Growth were similar in content to those from Apriori. The strongest patterns pointed to the same families of products and repeated combinations across customers. Support values were steady, and the logic of the rules matched what was visible in the transaction history. The main difference was simply that FP Growth reached these results with fewer intermediate steps.</text:p>
      <text:h text:style-name="Heading_20_1" text:outline-level="1"><text:bookmark-start text:name="__RefHeading___Toc652_116036760"/><text:soft-page-break/><text:span text:style-name="Strong_20_Emphasis"><text:span text:style-name="T3">3.4 Comparative Interpretation</text:span></text:span><text:bookmark-end text:name="__RefHeading___Toc652_116036760"/></text:h>
      <text:p text:style-name="Text_20_body">Apriori and FP Growth converged on the same purchasing patterns. Both methods identified combinations of small home decor items and seasonal goods, and both showed that these relationships were stable across the dataset. This consistency suggests that the patterns are genuine features of customer behaviour rather than a by-product of one specific algorithm.</text:p>
      <text:p text:style-name="Text_20_body">The real difference lies in how they work. Apriori builds candidate sets and filters them with several scans, while FP Growth compresses the information and extracts patterns more directly. Apriori is easier to follow conceptually, but it becomes heavy when the number of items increases. FP Growth is more efficient and suits larger datasets or environments where performance matters.</text:p>
      <text:p text:style-name="Text_20_body">For business use, both methods provide clear value. They help uncover product links that support cross selling, guide bundle design and inform merchandising decisions. In the context of the assignment, using both algorithms confirmed that the dataset had enough repeated structure to justify the recommendation models and support the broader machine learning pipeline.</text:p>
      <text:p text:style-name="Text_20_body"/>
      <text:h text:style-name="Heading_20_2" text:outline-level="2"><text:bookmark-start text:name="__RefHeading___Toc654_116036760"/>4. Dashboard and Strategic Insights<text:bookmark-end text:name="__RefHeading___Toc654_116036760"/></text:h>
      <text:h text:style-name="Heading_20_3" text:outline-level="3">4.1 Purpose of the Dashboard</text:h>
      <text:p text:style-name="Text_20_body">The objective of this dashboard is to support strategic decision making by translating transactional retail data into clear and actionable insights, the visualisations demonstrate how purchase behaviour evolves over time, when customers are most active, and how products relate within shopping baskets, the dashboard is used to illustrate the business value of implementing purchase tracking and recommendation systems, while also highlighting how data driven insights can inform promotion timing, product positioning, and future system integration.</text:p>
      <text:h text:style-name="Heading_20_3" text:outline-level="3">4.2 Overview of Sales Behaviour Over Time</text:h>
      <text:p text:style-name="Text_20_body">Figure 1 shows the <text:span text:style-name="T1">Monthly Sales Trend</text:span>, establishing the overall context of purchasing behaviour. Sales follow a stable pattern across time, with a clear seasonal increase during the final quarter of the year, aligned with Christmas demand. This confirms that purchasing behaviour is predictable at an aggregate level, which is a necessary condition for time aware recommendation strategies and promotion planning.</text:p>
      <text:p text:style-name="Text_20_body">Figure 2 explores <text:span text:style-name="T1">Daily Sales through</text:span> an interactive time window, revealing short term fluctuations within the broader trend. This view highlights periods of intensified activity and supports decisions related to when system driven recommendations, discounts, or campaigns are most likely to generate impact. Temporal localisation of sales reinforces the value of aligning recommendation systems with specific time windows rather than treating demand as uniform.</text:p>
      <text:p text:style-name="Text_20_body">Figure 3 presents a<text:span text:style-name="T1"> heatmap combining day of the week and hour of the day. </text:span>The visualisation reveals concentrated purchasing activity during specific hours on mid week days, offering clear guidance on optimal moments for triggering recommendations and promotional actions. These <text:soft-page-break/>patterns indicate that customer engagement is time sensitive and that recommendation systems can benefit from incorporating temporal features.</text:p>
      <text:p text:style-name="Text_20_body">Figure 4 summarises <text:span text:style-name="T1">Sales by Day of Week,</text:span> showing a strong concentration of activity on weekdays. Saturday appears with negligible volume due to dataset coverage and data cleaning, and therefore does not materially influence weekly patterns. The insight remains that purchasing behaviour follows a consistent weekly rhythm, which can be operationalised for campaign scheduling and system activation.</text:p>
      <text:p text:style-name="Text_20_body">Figure 5 identifies the Top 10 Products by Sales, highlighting a small set of items that generate a disproportionate share of revenue. These products act as anchors within the catalogue and are ideal candidates for recommendation seeding, as their frequent appearance increases the likelihood of successful cross selling and bundle formation.</text:p>
      <text:h text:style-name="Heading_20_2" text:outline-level="2"><text:bookmark-start text:name="__RefHeading___Toc656_116036760"/><text:span text:style-name="T4">4.3</text:span> <text:span text:style-name="T4">R</text:span>evenue concentration across product<text:bookmark-end text:name="__RefHeading___Toc656_116036760"/></text:h>
      <text:p text:style-name="Text_20_body">Figure 6 uses a<text:span text:style-name="T1"> treemap to visualise revenue concentration across products.</text:span> The structure confirms a long tail distribution, where a limited number of items dominate sales while many others contribute marginally. This reinforces the strategic value of targeted recommendations over broad promotions, focusing system attention on high impact product groups.</text:p>
      <text:p text:style-name="Text_20_body">Figure 7 presents a simplified co<text:span text:style-name="T1"> purchase network</text:span>, revealing strong and repeated relationships between specific products. These connections provide direct evidence of product affinity and form the foundation of Market Basket Analysis. Items with higher connectivity are natural candidates for cross selling strategies and bundled offers.</text:p>
      <text:p text:style-name="Text_20_body">Finally, Figure 8 visualises association <text:span text:style-name="T1">rules in three dimensions using support, confidence, and lift.</text:span> The presence of rule clusters with high lift confirms that product relationships are not random, but reflect consistent customer behaviour. This validates the use of association rule learning and recommendation systems within this dataset, demonstrating their relevance for driving informed retail decisi</text:p>
      <text:p text:style-name="Text_20_body"/>
      <text:p text:style-name="Text_20_body"><text:span text:style-name="Strong_20_Emphasis"/></text:p>
      <text:h text:style-name="P1" text:outline-level="2"><text:bookmark-start text:name="__RefHeading___Toc48_2954148867"/><text:span text:style-name="Strong_20_Emphasis">5. Data Preparation Rationale</text:span><text:bookmark-end text:name="__RefHeading___Toc48_2954148867"/></text:h>
      <text:h text:style-name="P1" text:outline-level="2"><text:bookmark-start text:name="__RefHeading___Toc50_2954148867"/><text:span text:style-name="Strong_20_Emphasis">5.1 Data Cleaning</text:span><text:bookmark-end text:name="__RefHeading___Toc50_2954148867"/></text:h>
      <text:p text:style-name="P2">Missing values were handled by removing transactions without product descriptions, as these entries could not contribute to the modelling process. Customer IDs with blank values were kept for item-level analysis but excluded from collaborative filtering, since user-based similarity requires identifiable users. Duplicates were removed when both the product code and timestamp matched exactly, as these records added no new information. Invalid records, such as negative quantities associated with returns, were handled separately and excluded from recommendation modelling because they do not reflect active user preferences.</text:p>
      <text:p text:style-name="P2"><text:soft-page-break/>These steps were necessary to maintain consistency across the analysis. Removing incomplete and duplicate entries avoids misleading patterns, and excluding return-related records ensures that recommendations are built from positive purchasing behaviour rather than corrective actions.</text:p>
      <text:h text:style-name="P1" text:outline-level="2"><text:bookmark-start text:name="__RefHeading___Toc52_2954148867"/><text:span text:style-name="Strong_20_Emphasis">5.2 Data Transformation &amp; Feature Engineering</text:span><text:bookmark-end text:name="__RefHeading___Toc52_2954148867"/></text:h>
      <text:p text:style-name="P2">Text cleaning was applied to product descriptions to prepare them for TF–IDF vectorisation. This involved converting text to lowercase, removing punctuation and eliminating repeated stopwords. These transformations made the input consistent for content-based filtering.</text:p>
      <text:p text:style-name="P2">No scaling was required for collaborative filtering because cosine similarity is insensitive to magnitude. For the dashboard, basic aggregations were created, such as total sales per product and purchases per month, to summarise the dataset in a readable format. Derived features were limited to those needed for modelling and visualisation, avoiding unnecessary transformations.</text:p>
      <text:h text:style-name="P1" text:outline-level="2"><text:bookmark-start text:name="__RefHeading___Toc54_2954148867"/><text:span text:style-name="Strong_20_Emphasis">5.3 Dataset Restructuring for Different Models</text:span><text:bookmark-end text:name="__RefHeading___Toc54_2954148867"/></text:h>
      <text:p text:style-name="P2"><text:span text:style-name="Strong_20_Emphasis">Pivot tables for collaborative filtering:</text:span><text:line-break/>A user–item matrix was created by pivoting transactions so that each row represented a customer and each column represented a product. Quantities were aggregated, and missing entries were filled with zeros to maintain a complete matrix for similarity calculations.</text:p>
      <text:p text:style-name="P2"><text:span text:style-name="Strong_20_Emphasis">Transaction lists for Apriori/FP-Growth:</text:span><text:line-break/>Each invoice number was converted into a list of items, forming the basic structure required for association rule learning. Only positive quantities were included to reflect items actively chosen by customers.</text:p>
      <text:p text:style-name="P2"><text:span text:style-name="Strong_20_Emphasis">Aggregated features for dashboard visuals:</text:span><text:line-break/>Simple summaries were produced to support the dashboard: total purchases per product, monthly sales counts, and customer-level activity metrics. These aggregates allowed the dashboard to communicate key information without overwhelming the user.</text:p>
      <text:h text:style-name="P1" text:outline-level="2"><text:bookmark-start text:name="__RefHeading___Toc56_2954148867"/><text:span text:style-name="Strong_20_Emphasis">5.4 Discussion of Decisions and Limitations</text:span><text:bookmark-end text:name="__RefHeading___Toc56_2954148867"/></text:h>
      <text:p text:style-name="P2">The chosen cleaning and transformation steps were appropriate because they aligned with the structure of the dataset and the needs of each model. Recommendation systems require clear item descriptions and stable user identifiers, while association rule learning depends on well-defined transaction lists. Pivot tables and aggregated summaries ensured that the data matched the technical requirements of collaborative filtering and the dashboard.</text:p>
      <text:p text:style-name="P2">There are limitations. Sparse user behaviour reduces the stability of user-user recommendations, and limited product metadata restricts the depth of the content-based model. The dataset also reflects a specific retail context, which may not generalise to other platforms. Future improvements could include richer product attributes, better handling of new users, and additional features for temporal analysis.</text:p>
      <text:p text:style-name="P2"><text:span text:style-name="Strong_20_Emphasis"/></text:p>
      <text:p text:style-name="P2"><text:soft-page-break/></text:p>
      <text:p text:style-name="P2"><text:span text:style-name="Strong_20_Emphasis"/></text:p>
      <text:h text:style-name="P1" text:outline-level="2"><text:bookmark-start text:name="__RefHeading___Toc658_116036760"/><text:span text:style-name="Strong_20_Emphasis">6. Conclusion</text:span><text:bookmark-end text:name="__RefHeading___Toc658_116036760"/></text:h>
      <text:p text:style-name="Text_20_body">This project shows how transactional retail data can be transformed into actionable insights when recommendation systems, market basket analysis, and interactive dashboards are applied as a unified workflow. Across all techniques, consistent patterns emerged, including predictable seasonal behaviour, clear time dependent purchasing windows, strong product concentration, and repeated co purchase relationships. These results confirm that customer behaviour follows identifiable structures rather than random variation.</text:p>
      <text:p text:style-name="Text_20_body">Recommendation systems highlighted the complementary value of content based and collaborative approaches. Content based filtering supported item similarity and catalogue navigation, while item item collaborative filtering captured behavioural relationships grounded in actual purchase history. Market Basket Analysis reinforced these findings by revealing stable product combinations with high lift, directly supporting cross selling and bundle strategies.</text:p>
      <text:p text:style-name="Text_20_body">The dashboard integrated these outputs into a coherent narrative, connecting when customers buy, what they buy, and how products interact within baskets. Together, these components demonstrate how data driven systems can support promotion timing, catalogue optimisation, and recommendation deployment within an online retail business.</text:p>
      <text:h text:style-name="Heading_20_2" text:outline-level="2"/>
      <text:h text:style-name="Heading_20_2" text:outline-level="2"><text:bookmark-start text:name="__RefHeading___Toc660_116036760"/>7. References<text:bookmark-end text:name="__RefHeading___Toc660_116036760"/></text:h>
      <text:p text:style-name="Text_20_body"><text:span text:style-name="Strong_20_Emphasis">Dataset</text:span></text:p>
      <text:p text:style-name="Quotations">Chen, D., Sain, S.L. and Guo, K. (2012) <text:span text:style-name="Emphasis">Data mining for the online retail industry: A case study of RFM model-based customer segmentation using data mining</text:span>. Available at: https://archive.ics.uci.edu/ml/datasets/online+retail+ii (Accessed: 12 December 2025).</text:p>
      <text:p text:style-name="Quotations">Kaggle (2023) <text:span text:style-name="Emphasis">Online Retail II UCI Dataset</text:span>. Available at: <text:a xlink:type="simple" xlink:href="https://www.kaggle.com/datasets/mashlyn/online-retail-ii-uci" office:target-frame-name="_new" xlink:show="replace" text:style-name="Internet_20_link" text:visited-style-name="Visited_20_Internet_20_Link">https://www.kaggle.com/datasets/mashlyn/online-retail-ii-uci</text:a> (Accessed: 12 December 2025).</text:p>
      <text:p text:style-name="Text_20_body"><text:span text:style-name="Strong_20_Emphasis">Market Basket Analysis / Association Rules</text:span></text:p>
      <text:p text:style-name="Quotations">Towards Data Science (2020) <text:span text:style-name="Emphasis">Market Basket Analysis with Apriori Algorithm</text:span>. Available at: https://towardsdatascience.com/market-basket-analysis-with-apriori-algorithm-970b57e8e6d (Accessed: 12 December 2025).</text:p>
      <text:p text:style-name="Quotations">Medium (2020) <text:span text:style-name="Emphasis">Understanding Market Basket Analysis and Association Rules</text:span>. Available at: https://medium.com/analytics-vidhya/understanding-market-basket-analysis-and-association-rules-9a39a36f1f38 (Accessed: 12 December 2025).</text:p>
      <text:p text:style-name="Text_20_body"><text:span text:style-name="Strong_20_Emphasis">Recommender Systems</text:span></text:p>
      <text:p text:style-name="Quotations"><text:soft-page-break/>Medium (2021) <text:span text:style-name="Emphasis">Item-Based Collaborative Filtering Explained</text:span>. Available at: https://medium.com/@siddharthjain2/item-based-collaborative-filtering-explained-4f3c5d7a8f9f (Accessed: 12 December 2025).</text:p>
      <text:p text:style-name="Text_20_body"><text:span text:style-name="Strong_20_Emphasis">Code / Practical Implementations</text:span></text:p>
      <text:p text:style-name="Quotations">GitHub (2023) <text:span text:style-name="Emphasis">Recommender Systems and Market Basket Analysis Examples</text:span>. Available at: <text:a xlink:type="simple" xlink:href="https://github.com/rasbt/python-machine-learning-book-2nd-edition" office:target-frame-name="_new" xlink:show="replace" text:style-name="Internet_20_link" text:visited-style-name="Visited_20_Internet_20_Link">https://github.com/rasbt/python-machine-learning-book-2nd-edition</text:a> (Accessed: 12 December 2025).</text:p>
      <text:p text:style-name="Text_20_body"/>
      <text:p text:style-name="Text_20_body"/>
      <text:h text:style-name="Heading_20_2" text:outline-level="2"><text:bookmark-start text:name="__RefHeading___Toc662_116036760"/>8. Appendix<text:bookmark-end text:name="__RefHeading___Toc662_116036760"/></text:h>
      <text:h text:style-name="Heading_20_3" text:outline-level="3">8.<text:span text:style-name="T4">1 </text:span>Reflection on AI Use</text:h>
      <text:p text:style-name="Text_20_body">This project reinforced the idea that effective use of artificial intelligence depends on human direction and judgement. AI functions as a powerful tool for accelerating repetitive tasks, exploring alternatives, and supporting the creation process, but it does not replace understanding, creativity, or critical thinking. Without a clear grasp of the problem domain and a defined analytical objective, AI generated outputs tend to remain shallow or generic.</text:p>
      <text:p text:style-name="Text_20_body">The human role remains that of the architect, deciding what questions matter, which results are meaningful, and how insights connect to real business decisions. AI complements this role by reducing friction and speeding up execution, but the quality and relevance of the outcome continue to depend on human reasoning and intentional design.</text:p>
      <text:p text:style-name="P2"><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_20__28_WW_29_" style:display-name="Default Paragraph Font (WW)" style:family="text"/>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07T15:20:57.547000000</meta:creation-date>
    <dc:date>2025-12-12T23:54:59.478000000</dc:date>
    <meta:editing-duration>PT10H22S</meta:editing-duration>
    <meta:editing-cycles>14</meta:editing-cycles>
    <meta:generator>LibreOffice/7.6.2.1$Windows_X86_64 LibreOffice_project/56f7684011345957bbf33a7ee678afaf4d2ba333</meta:generator>
    <meta:document-statistic meta:table-count="1" meta:image-count="1" meta:object-count="0" meta:page-count="11" meta:paragraph-count="102" meta:word-count="2639" meta:character-count="19010" meta:non-whitespace-character-count="16469"/>
  </office:meta>
</office:document-meta>
</file>